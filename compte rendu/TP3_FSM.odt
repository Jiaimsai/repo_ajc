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Policepardéfaut" style:family="text">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style:text-position="super 63.6%"/>
    </style:style>
    <style:style style:name="P28" style:parent-style-name="Normal" style:family="paragraph">
      <style:text-properties fo:font-weight="bold" style:font-weight-asian="bold" style:font-weight-complex="bold"/>
    </style:style>
    <style:style style:name="TableColumn30" style:family="table-column">
      <style:table-column-properties style:column-width="3.1465in"/>
    </style:style>
    <style:style style:name="TableColumn31" style:family="table-column">
      <style:table-column-properties style:column-width="3.1465in"/>
    </style:style>
    <style:style style:name="Table29" style:family="table">
      <style:table-properties style:width="6.293in" fo:margin-left="0in" table:align="lef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P57"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1. Dans un fichier .vhd, créez un module Counter_unit à partir du compteur du TP1. Le module prendra en entrée un signal d’horloge et de resetn, et donnera en sortie le signal end_counter. Utilisez un paramètre generic() pour définir le nombre de coup d’horloge à compter.</text:p>
      <text:p text:style-name="P2"/>
      <text:p text:style-name="P3">2. En schéma RTL, créez un compteur du signal end_counter. Ce compteur doit permettre de déterminer le nombre de cycles allumé/éteint qui ont été effectués par la LED. Le compteur doit pouvoir être remis à 0, maintenir sa valeur actuelle ou s’incrémenter.</text:p>
      <text:p text:style-name="Normal"><draw:frame draw:style-name="a0" draw:name="Image 13" text:anchor-type="as-char" svg:x="0in" svg:y="0in" svg:width="6.29444in" svg:height="2.14097in" style:rel-width="scale" style:rel-height="scale"><draw:image xlink:href="media/image1.png" xlink:type="simple" xlink:show="embed" xlink:actuate="onLoad"/><svg:title/><svg:desc/></draw:frame></text:p>
      <text:p text:style-name="Normal"/>
      <text:p text:style-name="Normal">Nous avons en entrer de notre compteur pour 3 signaux d’entrée dont 2 qui viennent du bloc counter_unit du TP2, si counter_end vaut 1 et Din est égale à 100_000_000 le signal en sortie vaut 1 et nous pouvons faire l’incrémentation sur cnt.</text:p>
      <text:p text:style-name="Normal"/>
      <text:p text:style-name="P4">3. Ecrivez un code VHDL décrivant ce compteur de cycle, vous utiliserez le module Counter_unit</text:p>
      <text:p text:style-name="P5"/>
      <text:p text:style-name="P6">4. Tester votre architecture avec un testbench</text:p>
      <text:p text:style-name="Normal">Sur le chronogramme nous devons oberserber l’incrémentation de cnt à chaque fois qu’end_counter passe à 0. Dans les conditions d’incrémentation il faut aussi que la valeur du signal interne Din soit égale à 100_000_000 avant de passer à 0 ce qui montre que les conditions ont été validé.</text:p>
      <text:p text:style-name="Normal"><draw:frame draw:style-name="a1" draw:name="Image 1" text:anchor-type="as-char" svg:x="0in" svg:y="0in" svg:width="6.3in" svg:height="0.89861in" style:rel-width="scale" style:rel-height="scale"><draw:image xlink:href="media/image2.png" xlink:type="simple" xlink:show="embed" xlink:actuate="onLoad"/><svg:title/><svg:desc/></draw:frame></text:p>
      <text:p text:style-name="Normal">Nous vérifions qu’à chaque cycle allumé/éteint d’end_counter nous avons une incrémentation de cnt qui représente notre compteur et que son incrémentation est bien incrémentée à chaque cycle d’end_counter. <text:s/></text:p>
      <text:p text:style-name="Normal">L’incrémentation s’effectue bien quand end_counter fait un cycle état bas et état haut, quand la valeur de Din touche la valeur max et Din repasse bien à 0 quand il touche la valeur max.</text:p>
      <text:p text:style-name="Normal"/>
      <text:p text:style-name="Normal"/>
      <text:soft-page-break/>
      <text:p text:style-name="P7">5. Créez en RTL une machine à états (FSM) permettant de faire clignoter une LED RGB en rouge puis bleu et enfin en vert avant de recommencer le cycle (rouge, bleu, vert, …). Dans chaque état la LED devra clignoter 3 fois. De plus, si le bouton restart est appuyé, on retourne dans l’état initial quel que soit l’état dans lequel on se situe. L’état initial est l’état dans lequel on se situe au démarrage, on passe à l’état rouge après 3 clignotements de la LED en blanc (rouge, vert et bleu actifs en même temps).</text:p>
      <text:p text:style-name="Normal"><draw:frame draw:style-name="a2" draw:name="Image 12" text:anchor-type="as-char" svg:x="0in" svg:y="0in" svg:width="6.3in" svg:height="1.65625in" style:rel-width="scale" style:rel-height="scale"><draw:image xlink:href="media/image3.png" xlink:type="simple" xlink:show="embed" xlink:actuate="onLoad"/><svg:title/><svg:desc/></draw:frame></text:p>
      <text:p text:style-name="Normal"/>
      <text:p text:style-name="Normal"><text:bookmark-start text:name="_Hlk234833259"/>Nous avons un registre et un multiplixeur qui vont servir a comparé et à choisir l’état dans lequel nous avons pour la machine à état. La sortie du registre nous amenons aussi le signal a des multiplexeurs de led afin de les commander. Le clignotement des leds est relié à counter_end ce qui permet leur clignotement. Nous changeons aussi la valeur de cnt on passe de 8 bits à 2 vu que l’incrémentation sera de 3 la valeur max.<text:s/></text:p>
      <text:p text:style-name="Normal"><text:bookmark-end text:name="_Hlk234833259"/><text:tab/><text:tab/><text:tab/><text:tab/><text:tab/><text:tab/><text:tab/></text:p>
      <text:p text:style-name="P8">6. Listez les signaux d’entrée, de sortie et les signaux internes de votre architecture</text:p>
      <text:p text:style-name="P9">Entrées:<text:s/></text:p>
      <text:p text:style-name="Normal">clk : signal d’horloge du système.</text:p>
      <text:p text:style-name="Normal">Reset_n : signal d’entrée relié à un bouton permettant la remise à zero du système.<text:s/></text:p>
      <text:p text:style-name="Normal"/>
      <text:p text:style-name="P10">Sorties:<text:s/></text:p>
      <text:p text:style-name="Normal"><text:span text:style-name="T11">led_r, led_g, led_b :<text:s/></text:span>signaux<text:span text:style-name="T12"><text:s/>de sorties relies aux led.</text:span></text:p>
      <text:p text:style-name="Normal"/>
      <text:p text:style-name="Normal">Signaux<text:span text:style-name="T13"><text:s/>internes :<text:s/></text:span></text:p>
      <text:p text:style-name="P14">current_state : correspond à l’état où se trouve la machine à état<text:s/></text:p>
      <text:p text:style-name="P15">next_state : correspond au prochain état où se trouve la machine à état</text:p>
      <text:p text:style-name="P16">cnt : vecteur de 2 bits contenant le compteur d’incrémentation pour les leds qui va jusqu’à 3 <text:s/></text:p>
      <text:p text:style-name="P17">Din : vecteur de 28 bits incrémenté à chaque coup de clk<text:s/></text:p>
      <text:p text:style-name="P18">end_counter : signal indiquant que la Valeur max a été attaint</text:p>
      <text:p text:style-name="P19"/>
      <text:p text:style-name="P20"/>
      <text:p text:style-name="P21"/>
      <text:soft-page-break/>
      <text:p text:style-name="P22">7. Ajoutez à votre code VHDL les éléments que vous venez de créer.</text:p>
      <text:p text:style-name="Normal"/>
      <text:p text:style-name="P23">8. Ecrivez un testbench pour tester votre architecture. Vérifiez à la simulation que vous obtenez le résultat attendu.</text:p>
      <text:p text:style-name="Normal">Le fichier de testbench nous permettra de vérifier le changement d’état à chaque 3 cycles de notre compteur, que c’est bien une incrémentation à chaque cycle d’end_counter et que le système est bien remis à 0 quand resetn est à l’état haut. <text:s/></text:p>
      <text:p text:style-name="Normal"><draw:frame draw:style-name="a3" draw:name="Image 1" text:anchor-type="as-char" svg:x="0in" svg:y="0in" svg:width="6.08878in" svg:height="1.08285in" style:rel-width="scale" style:rel-height="scale"><draw:image xlink:href="media/image4.png" xlink:type="simple" xlink:show="embed" xlink:actuate="onLoad"/><svg:title/><svg:desc/></draw:frame></text:p>
      <text:p text:style-name="Normal"/>
      <text:p text:style-name="Normal">Nous vérifions qu’à chaque état nous avons 3 cycles pour les leds avant de passer au prochain état. Quand on est à l’état idle les 3 leds sont bien maintenu à 1 avant de commencer l’alternance entre les 3 autres états. Le système est en attente que resetn pase à 0 avant de le démarrer en attenant tout le système est à 0.</text:p>
      <text:p text:style-name="Normal"><draw:frame draw:style-name="a4" draw:name="Image 14" text:anchor-type="as-char" svg:x="0in" svg:y="0in" svg:width="6.3in" svg:height="1.42361in" style:rel-width="scale" style:rel-height="scale"><draw:image xlink:href="media/image5.png" xlink:type="simple" xlink:show="embed" xlink:actuate="onLoad"/><svg:title/><svg:desc/></draw:frame></text:p>
      <text:p text:style-name="Normal">Nous vérifions ici l’incrémentation de cnt quand end_counter change d’état et que Din est égale à la valeur max avant de repasser à 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4">9. Exécutez la synthèse et relevez les ressources utilisées (y compris la FSM). Sur la schématique, identifiez où se situe votre compteur de cycle.</text:p>
      <text:p text:style-name="Normal"><draw:frame draw:style-name="a5" draw:name="Image 16" text:anchor-type="as-char" svg:x="0in" svg:y="0in" svg:width="1.85443in" svg:height="3.22962in" style:rel-width="scale" style:rel-height="scale"><draw:image xlink:href="media/image6.png" xlink:type="simple" xlink:show="embed" xlink:actuate="onLoad"/><svg:title/><svg:desc/></draw:frame></text:p>
      <text:p text:style-name="Normal">Nous avons les 2 buffers inputs pour le CLK et le resetn, les 3 buffers de sortie pour les 3 leds, le carry4 qui correspond à notre compteur, le<text:s/>FCDE (4)<text:s/>et FDSE qui sont là pour notre machine a état (idle, state1, state2 et state3).</text:p>
      <text:p text:style-name="Normal"><draw:frame draw:style-name="a6" draw:name="Image 10" text:anchor-type="as-char" svg:x="0in" svg:y="0in" svg:width="6.28014in" svg:height="2.81063in" style:rel-width="scale" style:rel-height="scale"><draw:image xlink:href="media/image7.png" xlink:type="simple" xlink:show="embed" xlink:actuate="onLoad"/><svg:title/><svg:desc/></draw:frame></text:p>
      <text:p text:style-name="Normal">Le compteur de cycle<text:s/>d’end counter<text:s/>est le<text:s/>bloc<text:s/>en rose<text:s/>qui permet le comptage avec end_counter<text:s/>nous pouvons fragmenter la vue afin de voir les différents blocs qui le compose.</text:p>
      <text:soft-page-break/>
      <text:p text:style-name="Normal"><draw:frame draw:style-name="a7" draw:name="Image 12" text:anchor-type="as-char" svg:x="0in" svg:y="0in" svg:width="6.3in" svg:height="2.88819in" style:rel-width="scale" style:rel-height="scale"><draw:image xlink:href="media/image8.png" xlink:type="simple" xlink:show="embed" xlink:actuate="onLoad"/><svg:title/><svg:desc/></draw:frame></text:p>
      <text:p text:style-name="Normal"><draw:frame draw:style-name="a8" draw:name="Image 11" text:anchor-type="as-char" svg:x="0in" svg:y="0in" svg:width="6.3in" svg:height="2.56736in" style:rel-width="scale" style:rel-height="scale"><draw:image xlink:href="media/image9.png" xlink:type="simple" xlink:show="embed" xlink:actuate="onLoad"/><svg:title/><svg:desc/></draw:frame></text:p>
      <text:p text:style-name="Normal">Le compteur de cycle cnt est le fil bleu</text:p>
      <text:p text:style-name="Normal">Avec ces schématiques nous pouvons aussi observer différentes entrées sorties de notre système tel que clk, resetn, et led_r, led_g et led_g pour les sorties.</text:p>
      <text:p text:style-name="Normal"/>
      <text:p text:style-name="P25">10. Modifiez le fichier de contraintes pour connecter vos entrées / sorties du système avec les broches de la carte. Réglez l’horloge pour que sa fréquence soit à 100MHz</text:p>
      <text:p text:style-name="Normal"><text:span text:style-name="T26"><draw:frame draw:style-name="a9" draw:name="Image 13" text:anchor-type="as-char" svg:x="0in" svg:y="0in" svg:width="5.83415in" svg:height="1.04181in" style:rel-width="scale" style:rel-height="scale"><draw:image xlink:href="media/image10.png" xlink:type="simple" xlink:show="embed" xlink:actuate="onLoad"/><svg:title/><svg:desc/></draw:frame></text:span></text:p>
      <text:p text:style-name="Normal">Pour le fichier de contraintes nous paramétrons l’horloge avec le create_clock en précisant la période que nous voulons dans notre cas<text:s/></text:p>
      <text:p text:style-name="Normal">T = 1/f avec f = 100Mhz donc T= 1/100 000 000 = 10x10<text:span text:style-name="T27">-9</text:span><text:s/>donc une période de 10 ns</text:p>
      <text:p text:style-name="Normal"/>
      <text:soft-page-break/>
      <text:p text:style-name="P28">11. Lancez l’implémentation puis étudiez le rapport de timing (vérifiez les violations de set up et de hold et identifiez le chemin critique).</text:p>
      <text:p text:style-name="Normal"><draw:frame draw:style-name="a10" draw:name="Image 17" text:anchor-type="as-char" svg:x="0in" svg:y="0in" svg:width="6.3in" svg:height="0.84722in" style:rel-width="scale" style:rel-height="scale"><draw:image xlink:href="media/image11.png" xlink:type="simple" xlink:show="embed" xlink:actuate="onLoad"/><svg:title/><svg:desc/></draw:frame></text:p>
      <table:table table:style-name="Table29">
        <table:table-columns>
          <table:table-column table:style-name="TableColumn30"/>
          <table:table-column table:style-name="TableColumn31"/>
        </table:table-columns>
        <table:table-row table:style-name="TableRow32">
          <table:table-cell table:style-name="TableCell33">
            <text:p text:style-name="P34"><text:bookmark-start text:name="_Hlk235105834"/>Chemin critique (ns)</text:p>
          </table:table-cell>
          <table:table-cell table:style-name="TableCell35">
            <text:p text:style-name="P36">5.918</text:p>
          </table:table-cell>
        </table:table-row>
        <table:table-row table:style-name="TableRow37">
          <table:table-cell table:style-name="TableCell38">
            <text:p text:style-name="P39">Worst negative slack (ns)</text:p>
          </table:table-cell>
          <table:table-cell table:style-name="TableCell40">
            <text:p text:style-name="P41">5.918</text:p>
          </table:table-cell>
        </table:table-row>
        <table:table-row table:style-name="TableRow42">
          <table:table-cell table:style-name="TableCell43">
            <text:p text:style-name="P44">Total negative slack (ns)</text:p>
          </table:table-cell>
          <table:table-cell table:style-name="TableCell45">
            <text:p text:style-name="P46">0</text:p>
          </table:table-cell>
        </table:table-row>
        <table:table-row table:style-name="TableRow47">
          <table:table-cell table:style-name="TableCell48">
            <text:p text:style-name="P49">Worst hold slack (ns)</text:p>
          </table:table-cell>
          <table:table-cell table:style-name="TableCell50">
            <text:p text:style-name="P51">0.229</text:p>
          </table:table-cell>
        </table:table-row>
        <table:table-row table:style-name="TableRow52">
          <table:table-cell table:style-name="TableCell53">
            <text:p text:style-name="P54">Total hold slack (ns)</text:p>
          </table:table-cell>
          <table:table-cell table:style-name="TableCell55">
            <text:p text:style-name="P56">0</text:p>
          </table:table-cell>
        </table:table-row>
      </table:table>
      <text:p text:style-name="Normal"><text:bookmark-start text:name="_Hlk235106009"/><text:bookmark-end text:name="_Hlk235105834"/>Pour vérifier que nous n’avons pas de violation de timing nous vérifions le pire cas le WNS qui est à 5.918ns tant qu’il est positif nous avons le pire slack donc<text:s/>tous<text:s/>les autres sont positif.</text:p>
      <text:p text:style-name="Normal"><text:bookmark-end text:name="_Hlk235106009"/><draw:frame draw:style-name="a11" draw:name="Image 18" text:anchor-type="as-char" svg:x="0in" svg:y="0in" svg:width="6.3in" svg:height="0.90208in" style:rel-width="scale" style:rel-height="scale"><draw:image xlink:href="media/image12.png" xlink:type="simple" xlink:show="embed" xlink:actuate="onLoad"/><svg:title/><svg:desc/></draw:frame></text:p>
      <text:p text:style-name="Normal">On voit le chemin critique qui passe dans le registre.</text:p>
      <text:p text:style-name="Normal"/>
      <text:p text:style-name="P57">12. Générez le bitstream pour vérifier le système sur carte.</text:p>
      <text:p text:style-name="Normal">Le bitstream a été généré et tourne parfaitement sur la carte, la led clignote bien par cycle et quand reset est pressé le système est en attente et après 3 clignotement il repart sans encombre.</text:p>
      <text:p text:style-name="Normal"><text:a xlink:href="https://www.youtube.com/watch?v=xTYTKL89EQY" office:target-frame-name="_top" xlink:show="replace"><text:span text:style-name="Lienhypertexte">https://www.youtube.com/watch?v=xTYTKL89EQY</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DengXian Light"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DengXian Light"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DengXian Light"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Titre3Car" style:display-name="Titre 3 Car" style:family="text" style:parent-style-name="Policepardéfaut">
      <style:text-properties style:font-name-asian="DengXian Light" style:font-name-complex="Times New Roman" fo:color="#2F5496" fo:font-size="14pt" style:font-size-asian="14pt" style:font-size-complex="14pt"/>
    </style:style>
    <style:style style:name="Titre4Car" style:display-name="Titre 4 Car" style:family="text" style:parent-style-name="Policepardéfaut">
      <style:text-properties style:font-name-asian="DengXian Light"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DengXian Light" style:font-name-complex="Times New Roman" fo:color="#2F5496"/>
    </style:style>
    <style:style style:name="Titre6Car" style:display-name="Titre 6 Car" style:family="text" style:parent-style-name="Policepardéfaut">
      <style:text-properties style:font-name-asian="DengXian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DengXian Light" style:font-name-complex="Times New Roman" fo:color="#595959"/>
    </style:style>
    <style:style style:name="Titre8Car" style:display-name="Titre 8 Car" style:family="text" style:parent-style-name="Policepardéfaut">
      <style:text-properties style:font-name-asian="DengXian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DengXian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DengXian Light"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DengXian Light"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DengXian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en zhang</meta:initial-creator>
    <dc:creator>damien zhang</dc:creator>
    <meta:creation-date>2026-07-07T12:39:00Z</meta:creation-date>
    <dc:date>2026-07-16T15:24:00Z</dc:date>
    <meta:template xlink:href="Normal.dotm" xlink:type="simple"/>
    <meta:editing-cycles>9</meta:editing-cycles>
    <meta:editing-duration>PT65460S</meta:editing-duration>
    <meta:document-statistic meta:page-count="6" meta:paragraph-count="12" meta:word-count="952" meta:character-count="6178" meta:row-count="43" meta:non-whitespace-character-count="5238"/>
  </office:meta>
</office:document-meta>
</file>