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2. En schéma RTL, créez un compteur du signal end_counter. Ce compteur doit permettre de déterminer le nombre de cycles allumé/éteint qui ont été effectués par la LED. Le compteur doit pouvoir être remis à 0, maintenir sa valeur actuelle ou s’incrémenter.</text:p>
      <text:p text:style-name="Normal"><draw:frame draw:style-name="a0" draw:name="Image 3" text:anchor-type="as-char" svg:x="0in" svg:y="0in" svg:width="4.4392in" svg:height="1.92145in" style:rel-width="scale" style:rel-height="scale"><draw:image xlink:href="media/image1.png" xlink:type="simple" xlink:show="embed" xlink:actuate="onLoad"/><svg:title/><svg:desc/></draw:frame></text:p>
      <text:p text:style-name="Normal">Nous avons en entrer de notre compteur pour 3 signaux d’entrée dont 2 qui viennent du bloc counter_unit du TP2, si counter_end vaut 1 et Din est égale à max le signal en sortie vaut 1 et nous pouvons faire l’incrémentation.</text:p>
      <text:p text:style-name="Normal">4. Tester votre architecture avec un testbench</text:p>
      <text:p text:style-name="Normal"><draw:frame draw:style-name="a1" draw:name="Image 1" text:anchor-type="as-char" svg:x="0in" svg:y="0in" svg:width="6.3in" svg:height="0.89861in" style:rel-width="scale" style:rel-height="scale"><draw:image xlink:href="media/image2.png" xlink:type="simple" xlink:show="embed" xlink:actuate="onLoad"/><svg:title/><svg:desc/></draw:frame></text:p>
      <text:p text:style-name="Normal">Nous vérifions qu’à chaque cycle allumé/éteint d’end_counter nous avons une incrémentation de cnt qui représente notre compteur. <text:s/></text:p>
      <text:p text:style-name="Normal">5. Créez en RTL une machine à états (FSM) permettant de faire clignoter une LED RGB en rouge puis bleu et enfin en vert avant de recommencer le cycle (rouge, bleu, vert, …). Dans chaque état la LED devra clignoter 3 fois. De plus, si le bouton restart est appuyé, on retourne dans l’état initial quel que soit l’état dans lequel on se situe. L’état initial est l’état dans lequel on se situe au démarrage, on passe à l’état rouge après 3 clignotements de la LED en blanc (rouge, vert et bleu actifs en même temps).</text:p>
      <text:p text:style-name="Normal"><draw:frame draw:style-name="a2" draw:name="Image 9" text:anchor-type="as-char" svg:x="0in" svg:y="0in" svg:width="6.28333in" svg:height="1.94792in" style:rel-width="scale" style:rel-height="scale"><draw:image xlink:href="media/image3.png" xlink:type="simple" xlink:show="embed" xlink:actuate="onLoad"/><svg:title/><svg:desc/></draw:frame></text:p>
      <text:p text:style-name="Normal"><text:bookmark-start text:name="_Hlk234833259"/>Nous avons un registre et un multiplixeur qui vont servir a comparé et<text:s/>à<text:s/>choisir l’état dans lequel nous avons pour la machine à état. La sortie du registre nous amenons aussi le signal a des multiplexeurs de led afin de les commander. Le clignotement des leds est relié à counter_end ce qui permet leur clignotement.</text:p>
      <text:p text:style-name="Normal"><text:bookmark-end text:name="_Hlk234833259"/><text:tab/><text:tab/><text:tab/><text:tab/><text:tab/><text:tab/><text:tab/></text:p>
      <text:soft-page-break/>
      <text:p text:style-name="Normal">6. Listez les signaux d’entrée, de sortie et les signaux internes de votre architecture</text:p>
      <text:p text:style-name="P2">Entrées: clk, restart</text:p>
      <text:p text:style-name="P3">Sorties: led_r, led_g, led_b</text:p>
      <text:p text:style-name="P4"><text:s/>Signaux internes: current_state, next_state, cnt2, Din, end_counter</text:p>
      <text:p text:style-name="P5"/>
      <text:p text:style-name="Normal">8. Ecrivez un testbench pour tester votre architecture. Vérifiez à la simulation que vous obtenez le résultat attendu.</text:p>
      <text:p text:style-name="Normal"><draw:frame draw:style-name="a3" draw:name="Image 10" text:anchor-type="as-char" svg:x="0in" svg:y="0in" svg:width="6.3in" svg:height="1.23819in" style:rel-width="scale" style:rel-height="scale"><draw:image xlink:href="media/image4.png" xlink:type="simple" xlink:show="embed" xlink:actuate="onLoad"/><svg:title/><svg:desc/></draw:frame></text:p>
      <text:p text:style-name="Normal">Nous vérifions qu’à chaque état nous avons 3 cycles pour les leds avant de passer au prochain état. Quand on est à l’état idle les 3 leds sont bien maintenu à 1 avant de commencer l’alternance entre les 3 autres états.</text:p>
      <text:p text:style-name="Normal"/>
      <text:p text:style-name="Normal">9. Exécutez la synthèse et relevez les ressources utilisées (y compris la FSM). Sur la schématique, identifiez où se situe votre compteur de cycle.</text:p>
      <text:p text:style-name="Normal"><draw:frame draw:style-name="a4" draw:name="Image 4" text:anchor-type="as-char" svg:x="0in" svg:y="0in" svg:width="3.38589in" svg:height="2.94833in" style:rel-width="scale" style:rel-height="scale"><draw:image xlink:href="media/image5.png" xlink:type="simple" xlink:show="embed" xlink:actuate="onLoad"/><svg:title/><svg:desc/></draw:frame></text:p>
      <text:p text:style-name="Normal">Nous avons les 2 inputs pour le CLK et restart, les registres pour les 2 compteurs et les différents MUX<text:s/></text:p>
      <text:soft-page-break/>
      <text:p text:style-name="Normal"><draw:frame draw:style-name="a5" draw:name="Image 5" text:anchor-type="as-char" svg:x="0in" svg:y="0in" svg:width="6.3in" svg:height="3.34792in" style:rel-width="scale" style:rel-height="scale"><draw:image xlink:href="media/image6.png" xlink:type="simple" xlink:show="embed" xlink:actuate="onLoad"/><svg:title/><svg:desc/></draw:frame></text:p>
      <text:p text:style-name="Normal">Le compteur de cyclé est le fils en rose.</text:p>
      <text:p text:style-name="Normal"/>
      <text:p text:style-name="Normal">11. Lancez l’implémentation puis étudiez le rapport de timing (vérifiez les violations de set up et de hold et identifiez le chemin critique).</text:p>
      <text:p text:style-name="Normal"><draw:frame draw:style-name="a6" draw:name="Image 6" text:anchor-type="as-char" svg:x="0in" svg:y="0in" svg:width="6.3in" svg:height="0.85903in" style:rel-width="scale" style:rel-height="scale"><draw:image xlink:href="media/image7.png" xlink:type="simple" xlink:show="embed" xlink:actuate="onLoad"/><svg:title/><svg:desc/></draw:frame></text:p>
      <text:p text:style-name="Normal">Le setup et le hold sont à 0ns donc nous n’avons pas de violation de timing</text:p>
      <text:p text:style-name="Normal"><draw:frame draw:style-name="a7" draw:name="Image 7" text:anchor-type="as-char" svg:x="0in" svg:y="0in" svg:width="6.3in" svg:height="1.02222in" style:rel-width="scale" style:rel-height="scale"><draw:image xlink:href="media/image8.png" xlink:type="simple" xlink:show="embed" xlink:actuate="onLoad"/><svg:title/><svg:desc/></draw:frame></text:p>
      <text:p text:style-name="Normal">On voit le chemin critique qui passe dans le registre.</text:p>
      <text:p text:style-name="Normal"/>
      <text:p text:style-name="Normal">12. Générez le bitstream pour vérifier le système sur carte.</text:p>
      <text:p text:style-name="Normal"><text:a xlink:href="https://www.youtube.com/watch?v=xTYTKL89EQY" office:target-frame-name="_top" xlink:show="replace"><text:span text:style-name="Lienhypertexte">https://www.youtube.com/watch?v=xTYTKL89EQY</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DengXian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DengXian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DengXian Light"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DengXian Light"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DengXian Light"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DengXian Light"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DengXian Light"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DengXian Light"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DengXian Light"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DengXian Light"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DengXian Light" style:font-name-complex="Times New Roman" fo:color="#2F5496" fo:font-size="16pt" style:font-size-asian="16pt" style:font-size-complex="16pt"/>
    </style:style>
    <style:style style:name="Titre3Car" style:display-name="Titre 3 Car" style:family="text" style:parent-style-name="Policepardéfaut">
      <style:text-properties style:font-name-asian="DengXian Light" style:font-name-complex="Times New Roman" fo:color="#2F5496" fo:font-size="14pt" style:font-size-asian="14pt" style:font-size-complex="14pt"/>
    </style:style>
    <style:style style:name="Titre4Car" style:display-name="Titre 4 Car" style:family="text" style:parent-style-name="Policepardéfaut">
      <style:text-properties style:font-name-asian="DengXian Light"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DengXian Light" style:font-name-complex="Times New Roman" fo:color="#2F5496"/>
    </style:style>
    <style:style style:name="Titre6Car" style:display-name="Titre 6 Car" style:family="text" style:parent-style-name="Policepardéfaut">
      <style:text-properties style:font-name-asian="DengXian Light"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DengXian Light" style:font-name-complex="Times New Roman" fo:color="#595959"/>
    </style:style>
    <style:style style:name="Titre8Car" style:display-name="Titre 8 Car" style:family="text" style:parent-style-name="Policepardéfaut">
      <style:text-properties style:font-name-asian="DengXian Light"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DengXian Light"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DengXian Light"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DengXian Light"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DengXian Light"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DengXian Light"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mien zhang</meta:initial-creator>
    <dc:creator>damien zhang</dc:creator>
    <meta:creation-date>2026-07-07T12:39:00Z</meta:creation-date>
    <dc:date>2026-07-13T10:40:00Z</dc:date>
    <meta:template xlink:href="Normal.dotm" xlink:type="simple"/>
    <meta:editing-cycles>5</meta:editing-cycles>
    <meta:editing-duration>PT53820S</meta:editing-duration>
    <meta:document-statistic meta:page-count="3" meta:paragraph-count="5" meta:word-count="431" meta:character-count="2798" meta:row-count="19" meta:non-whitespace-character-count="2372"/>
  </office:meta>
</office:document-meta>
</file>