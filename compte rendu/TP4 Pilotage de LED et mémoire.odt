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2. Modifiez votre architecture pour piloter une LED rouge et une LED verte. Lorsque le bouton_0 est appuyé, la LED verte est allumée, sinon la LED rouge est allumée.</text:p>
      <text:p text:style-name="Normal"><draw:frame draw:style-name="a0" draw:name="Image 2" text:anchor-type="as-char" svg:x="0in" svg:y="0in" svg:width="6.29861in" svg:height="2.4625in" style:rel-width="scale" style:rel-height="scale"><draw:image xlink:href="media/image1.png" xlink:type="simple" xlink:show="embed" xlink:actuate="onLoad"/><svg:title/><svg:desc/></draw:frame></text:p>
      <text:p text:style-name="Normal">Nous avons un registre et un multiplixeur qui vont servir a comparé et à choisir l’état dans lequel nous avons pour la machine à état. La sortie du registre nous amenons à un comparateur si l’état de la machine a état le permet et si bouton est ‘1’ ou non cela nous permet de choisir quel led est allumé. Ce signal va multiplexeurs de led afin de les commander. Le clignotement des leds est relié à counter_end ce qui permet leur clignotement.</text:p>
      <text:p text:style-name="Normal">14. Réalisez une simulation en rédigeant un testbench. Que se passe-t-il si le bouton est pressé pendant plus d’un cycle d’horloge ?</text:p>
      <text:p text:style-name="Normal"><draw:frame draw:style-name="a1" draw:name="Image 1" text:anchor-type="as-char" svg:x="0in" svg:y="0in" svg:width="6.3in" svg:height="1.875in" style:rel-width="scale" style:rel-height="scale"><draw:image xlink:href="media/image2.png" xlink:type="simple" xlink:show="embed" xlink:actuate="onLoad"/><svg:title/><svg:desc/></draw:frame></text:p>
      <text:p text:style-name="Normal">Tant que le bouton est maintenu il reste dans l’état 1 et la led rouge est allumé.</text:p>
      <text:p text:style-name="Normal"/>
      <text:p text:style-name="Normal">5. Que faudrait-il faire pour que la LED ne clignote en vert qu’une seule fois même si le bouton est maintenu ?</text:p>
      <text:p text:style-name="Normal">Mettre la valeur du bouton dans un signal interne qui sert de flag/mémoire et avoir un autre signal interne qui va bloquer l’état tant que bouton n’a pas changé d’état lui aussi ne change pas.</text:p>
      <text:p text:style-name="Normal"/>
      <text:p text:style-name="Normal"/>
      <text:p text:style-name="Normal"/>
      <text:p text:style-name="Normal"/>
      <text:soft-page-break/>
      <text:p text:style-name="Normal">7. Mettez à jour votre code VHDL et vérifiez votre résultat à la simulation</text:p>
      <text:p text:style-name="Normal"/>
      <text:p text:style-name="Normal"><draw:frame draw:style-name="a2" draw:name="Image 3" text:anchor-type="as-char" svg:x="0in" svg:y="0in" svg:width="6.3in" svg:height="1.59583in" style:rel-width="scale" style:rel-height="scale"><draw:image xlink:href="media/image3.png" xlink:type="simple" xlink:show="embed" xlink:actuate="onLoad"/><svg:title/><svg:desc/></draw:frame></text:p>
      <text:p text:style-name="Normal">8. Créez un module de pilotage d’une LED RGB en RTL. Ce dernier doit permettre de faire clignoter une LED RGB connectée en sortie d’une couleur définie par un code couleur donné en entrée. Le changement de couleur de la LED RGB n’a lieu que si un signal update est reçu.</text:p>
      <text:p text:style-name="Normal"><draw:frame draw:style-name="a3" draw:name="Image 7" text:anchor-type="as-char" svg:x="0in" svg:y="0in" svg:width="6.3in" svg:height="3.68889in" style:rel-width="scale" style:rel-height="scale"><draw:image xlink:href="media/image4.png" xlink:type="simple" xlink:show="embed" xlink:actuate="onLoad"/><svg:title/><svg:desc/></draw:frame></text:p>
      <text:p text:style-name="Normal">Le signal en sortie de la machine à état part dans un comparateur qui si est à 1 avec le bouton « update » va prendre la valeur du bon color_code dans le multiplexeur. Si tout les conditions sont rempli, une des leds va clignoter pendant que les autres seront à ‘0’.<text:s/></text:p>
      <text:p text:style-name="Normal">12. Vérifier votre résultat à la simulation</text:p>
      <text:p text:style-name="Normal"><draw:frame draw:style-name="a4" draw:name="Image 6" text:anchor-type="as-char" svg:x="0in" svg:y="0in" svg:width="6.3in" svg:height="1.51875in" style:rel-width="scale" style:rel-height="scale"><draw:image xlink:href="media/image5.png" xlink:type="simple" xlink:show="embed" xlink:actuate="onLoad"/><svg:title/><svg:desc/></draw:frame></text:p>
      <text:soft-page-break/>
      <text:p text:style-name="Normal">Nous pouvons vérifier plusieurs conditions demandées dans le cahier des charges, update doit recevoir 1 quand btn0 est appuyé, le signal color mappé sur color_code qui à l’état 1 doit renvoyer du vert et à l’état 0 du bleu et en plus l’alternance des couleurs n’est réalisé que quand update est trigger.</text:p>
      <text:p text:style-name="Normal">13. Réalisez une synthèse et étudiez le rapport de synthèse, les ressources utilisées doivent correspondre à votre schéma RTL.</text:p>
      <text:p text:style-name="Normal"><draw:frame draw:style-name="a5" draw:name="Image 7" text:anchor-type="as-char" svg:x="0in" svg:y="0in" svg:width="6.3in" svg:height="2.14583in" style:rel-width="scale" style:rel-height="scale"><draw:image xlink:href="media/image6.png" xlink:type="simple" xlink:show="embed" xlink:actuate="onLoad"/><svg:title/><svg:desc/></draw:frame></text:p>
      <text:p text:style-name="Normal">Nous avons les 2 inputs pour les boutons, les registres pour les compteurs et les différents mux pour les opérations et la machine à état.</text:p>
      <text:p text:style-name="Normal">14. Effectuez le placement routage et étudiez les rapports.</text:p>
      <text:p text:style-name="Normal"><draw:frame draw:style-name="a6" draw:name="Image 9" text:anchor-type="as-char" svg:x="0in" svg:y="0in" svg:width="6.3in" svg:height="0.72639in" style:rel-width="scale" style:rel-height="scale"><draw:image xlink:href="media/image7.png" xlink:type="simple" xlink:show="embed" xlink:actuate="onLoad"/><svg:title/><svg:desc/></draw:frame></text:p>
      <text:p text:style-name="Normal">Le setup et le hold sont à 0ns donc nous n’avons pas de violation de timing</text:p>
      <text:p text:style-name="Normal"><draw:frame draw:style-name="a7" draw:name="Image 10" text:anchor-type="as-char" svg:x="0in" svg:y="0in" svg:width="6.3in" svg:height="1.02778in" style:rel-width="scale" style:rel-height="scale"><draw:image xlink:href="media/image8.png" xlink:type="simple" xlink:show="embed" xlink:actuate="onLoad"/><svg:title/><svg:desc/></draw:frame></text:p>
      <text:p text:style-name="Normal">On voit le chemin critique qui passe dans le registre et qui est très faible.</text:p>
      <text:p text:style-name="Normal">15. Générez le bitstream et vérifiez que vous avez le comportement attendu sur carte.</text:p>
      <text:p text:style-name="Normal">Tous les comportements sont respectés et réagissent à ce que nous attendions d’eux.</text:p>
      <text:p text:style-name="Normal"><text:a xlink:href="https://youtu.be/jT6yvbVGPaw" office:target-frame-name="_top" xlink:show="replace"><text:span text:style-name="Lienhypertexte">https://youtu.be/jT6yvbVGPaw</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DengXian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DengXian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DengXian Light"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DengXian Light"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DengXian Light"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Titre3Car" style:display-name="Titre 3 Car" style:family="text" style:parent-style-name="Policepardéfaut">
      <style:text-properties style:font-name-asian="DengXian Light" style:font-name-complex="Times New Roman" fo:color="#2F5496" fo:font-size="14pt" style:font-size-asian="14pt" style:font-size-complex="14pt"/>
    </style:style>
    <style:style style:name="Titre4Car" style:display-name="Titre 4 Car" style:family="text" style:parent-style-name="Policepardéfaut">
      <style:text-properties style:font-name-asian="DengXian Light"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DengXian Light" style:font-name-complex="Times New Roman" fo:color="#2F5496"/>
    </style:style>
    <style:style style:name="Titre6Car" style:display-name="Titre 6 Car" style:family="text" style:parent-style-name="Policepardéfaut">
      <style:text-properties style:font-name-asian="DengXian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DengXian Light" style:font-name-complex="Times New Roman" fo:color="#595959"/>
    </style:style>
    <style:style style:name="Titre8Car" style:display-name="Titre 8 Car" style:family="text" style:parent-style-name="Policepardéfaut">
      <style:text-properties style:font-name-asian="DengXian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DengXian Light"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DengXian Light"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DengXian Light"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DengXian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mien zhang</meta:initial-creator>
    <dc:creator>damien zhang</dc:creator>
    <meta:creation-date>2026-07-09T15:35:00Z</meta:creation-date>
    <dc:date>2026-07-13T09:15:00Z</dc:date>
    <meta:template xlink:href="Normal.dotm" xlink:type="simple"/>
    <meta:editing-cycles>5</meta:editing-cycles>
    <meta:editing-duration>PT13500S</meta:editing-duration>
    <meta:document-statistic meta:page-count="3" meta:paragraph-count="5" meta:word-count="436" meta:character-count="2834" meta:row-count="20" meta:non-whitespace-character-count="2403"/>
  </office:meta>
</office:document-meta>
</file>