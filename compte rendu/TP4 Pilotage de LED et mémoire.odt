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T3" style:parent-style-name="Policepardéfaut" style:family="text">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T6" style:parent-style-name="Policepardéfaut" style:family="text">
      <style:text-properties fo:font-weight="bold" style:font-weight-asian="bold" style:font-weight-complex="bold"/>
    </style:style>
    <style:style style:name="T7" style:parent-style-name="Policepardéfaut" style:family="text">
      <style:text-properties fo:font-weight="bold" style:font-weight-asian="bold" style:font-weight-complex="bold"/>
    </style:style>
    <style:style style:name="T8" style:parent-style-name="Policepardéfaut" style:family="text">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T17" style:parent-style-name="Policepardéfaut" style:family="text">
      <style:text-properties style:text-position="super 63.6%"/>
    </style:style>
    <style:style style:name="P18" style:parent-style-name="Normal" style:family="paragraph">
      <style:text-properties fo:font-weight="bold" style:font-weight-asian="bold" style:font-weight-complex="bold"/>
    </style:style>
    <style:style style:name="TableColumn20" style:family="table-column">
      <style:table-column-properties style:column-width="3.1465in"/>
    </style:style>
    <style:style style:name="TableColumn21" style:family="table-column">
      <style:table-column-properties style:column-width="3.1465in"/>
    </style:style>
    <style:style style:name="Table19" style:family="table">
      <style:table-properties style:width="6.293in" fo:margin-left="0in" table:align="left"/>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style>
    <style:style style:name="P47" style:parent-style-name="Normal" style:family="paragraph">
      <style:text-properties fo:font-weight="bold" style:font-weight-asian="bold" style:font-weight-complex="bold"/>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3" style:parent-style-name="Graphics">
      <style:graphic-properties fo:border="0.01042in 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4"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5" style:parent-style-name="Graphics">
      <style:graphic-properties fo:border="0.01042in none" fo:background-color="transparent"/>
    </style:style>
    <style:style style:family="graphic" style:name="a16"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7"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8"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9"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1. Créez une architecture RTL permettant de faire clignoter une LED (par exemple la led0_r) en utilisant le module Counter_unit du TP2 et une machine à état.<text:s/></text:p>
      <text:p text:style-name="P2"/>
      <text:p text:style-name="Normal"><text:span text:style-name="T3">2. Modifiez votre architecture pour piloter une LED rouge et une LED verte. Lorsque le bouton_0 est appuyé, la LED verte est allumée, sinon la LED rouge est allumée.</text:span><text:s/></text:p>
      <text:p text:style-name="Normal"><draw:frame draw:style-name="a0" draw:name="Image 9" text:anchor-type="as-char" svg:x="0in" svg:y="0in" svg:width="6.31255in" svg:height="1.75581in" style:rel-width="scale" style:rel-height="scale"><draw:image xlink:href="media/image1.png" xlink:type="simple" xlink:show="embed" xlink:actuate="onLoad"/><svg:title/><svg:desc/></draw:frame></text:p>
      <text:p text:style-name="Normal"><draw:frame draw:z-index="251667456" draw:style-name="a1" draw:name="Encre 25" text:anchor-type="paragraph" svg:x="1.80048in" svg:y="0.64348in" svg:width="0.00039in" svg:height="0.00039in" style:rel-width="scale" style:rel-height="scale"><draw:image xlink:href="media/image2.png" xlink:type="simple" xlink:show="embed" xlink:actuate="onLoad"/><svg:title/><svg:desc/></draw:frame>Nous avons un registre et un multiplixeur qui vont servir a comparé et à choisir l’état dans lequel nous avons pour la machine à état. La sortie du registre nous amenons à un comparateur si l’état de la machine a état le permet et si bouton est ‘1’ ou non cela nous permet de choisir quel led est allumé. Ce signal va multiplexeurs de led afin de les commander. Le clignotement des leds est relié à counter_end ce qui permet leur clignotement.</text:p>
      <text:p text:style-name="Normal"/>
      <text:p text:style-name="P4">3. Rédigez le code VHDL de votre architecture.</text:p>
      <text:p text:style-name="P5"/>
      <text:p text:style-name="Normal"><text:span text:style-name="T6">4. Réalisez une simulation en rédigeant un testbench. Que se passe-t-il si le bouton est pressé pendant plus d’un cycle d’horloge ?</text:span><text:s/></text:p>
      <text:p text:style-name="Normal">L’objectif de ce testbench est de vérifier les transitions led rouge vers led verte et inversement par rapport à l’état du bouton btn</text:p>
      <text:p text:style-name="Normal"><draw:frame draw:z-index="251696128" draw:id="id0" draw:style-name="a2" draw:name="Encre 44" text:anchor-type="paragraph" svg:x="0.20347in" svg:y="0.3125in" svg:width="0.40486in" svg:height="0.12153in" style:rel-width="scale" style:rel-height="scale"><draw:image xlink:href="media/image3.png" xlink:type="simple" xlink:show="embed" xlink:actuate="onLoad"/><svg:title/><svg:desc/></draw:frame><draw:frame draw:z-index="251684864" draw:id="id1" draw:style-name="a3" draw:name="Encre 32" text:anchor-type="paragraph" svg:x="0.21645in" svg:y="0.34126in" svg:width="0.39375in" svg:height="0.10417in" style:rel-width="scale" style:rel-height="scale"><draw:image xlink:href="media/image4.png" xlink:type="simple" xlink:show="embed" xlink:actuate="onLoad"/><svg:title/><svg:desc/></draw:frame><draw:frame draw:z-index="251683840" draw:id="id2" draw:style-name="a4" draw:name="Encre 31" text:anchor-type="paragraph" svg:x="1.29322in" svg:y="0.65701in" svg:width="0.00039in" svg:height="0.00039in" style:rel-width="scale" style:rel-height="scale"><draw:image xlink:href="media/image5.png" xlink:type="simple" xlink:show="embed" xlink:actuate="onLoad"/><svg:title/><svg:desc/></draw:frame><draw:frame draw:z-index="251682816" draw:id="id3" draw:style-name="a5" draw:name="Encre 30" text:anchor-type="paragraph" svg:x="0.39913in" svg:y="0.39087in" svg:width="0.14167in" svg:height="0.0375in" style:rel-width="scale" style:rel-height="scale"><draw:image xlink:href="media/image6.png" xlink:type="simple" xlink:show="embed" xlink:actuate="onLoad"/><svg:title/><svg:desc/></draw:frame><draw:frame draw:z-index="251669504" draw:style-name="a6" draw:name="Encre 27" text:anchor-type="paragraph" svg:x="5.09221in" svg:y="0.07541in" svg:width="0.00039in" svg:height="0.00039in" style:rel-width="scale" style:rel-height="scale"><draw:image xlink:href="media/image2.png" xlink:type="simple" xlink:show="embed" xlink:actuate="onLoad"/><svg:title/><svg:desc/></draw:frame><draw:frame draw:z-index="251666432" draw:style-name="a7" draw:name="Encre 24" text:anchor-type="paragraph" svg:x="0.26528in" svg:y="0.33194in" svg:width="0.31111in" svg:height="0.11806in" style:rel-width="scale" style:rel-height="scale"><draw:image xlink:href="media/image7.png" xlink:type="simple" xlink:show="embed" xlink:actuate="onLoad"/><svg:title/><svg:desc/></draw:frame><draw:frame draw:z-index="251660288" draw:style-name="a8" draw:name="Encre 11" text:anchor-type="paragraph" svg:x="0.2241in" svg:y="0.36045in" svg:width="0.02083in" svg:height="0.03958in" style:rel-width="scale" style:rel-height="scale"><draw:image xlink:href="media/image8.png" xlink:type="simple" xlink:show="embed" xlink:actuate="onLoad"/><svg:title/><svg:desc/></draw:frame><draw:frame draw:z-index="251659264" draw:style-name="a9" draw:name="Encre 10" text:anchor-type="paragraph" svg:x="0.20953in" svg:y="0.35454in" svg:width="0.15417in" svg:height="0.04792in" style:rel-width="scale" style:rel-height="scale"><draw:image xlink:href="media/image9.png" xlink:type="simple" xlink:show="embed" xlink:actuate="onLoad"/><svg:title/><svg:desc/></draw:frame><draw:frame draw:style-name="a10" draw:name="Image 1" text:anchor-type="as-char" svg:x="0in" svg:y="0in" svg:width="6.3in" svg:height="1.875in" style:rel-width="scale" style:rel-height="scale"><draw:image xlink:href="media/image10.png" xlink:type="simple" xlink:show="embed" xlink:actuate="onLoad"/><svg:title/><svg:desc/></draw:frame></text:p>
      <text:p text:style-name="Normal">Tant que le bouton est maintenu il reste dans l’état 1 et la led rouge est allumé si le bouton est relaché et est à l’état 0 la led est verte prend le relais.<text:s/></text:p>
      <text:p text:style-name="Normal"/>
      <text:p text:style-name="Normal"/>
      <text:p text:style-name="Normal"/>
      <text:soft-page-break/>
      <text:p text:style-name="Normal"><text:span text:style-name="T7"><draw:frame draw:z-index="251668480" draw:style-name="a11" draw:name="Encre 26" text:anchor-type="paragraph" svg:x="1.81426in" svg:y="0.14144in" svg:width="0.00039in" svg:height="0.00039in" style:rel-width="scale" style:rel-height="scale"><draw:image xlink:href="media/image2.png" xlink:type="simple" xlink:show="embed" xlink:actuate="onLoad"/><svg:title/><svg:desc/></draw:frame></text:span><text:span text:style-name="T8">5. Que faudrait-il faire pour que la LED ne clignote en vert qu’une seule fois même si le bouton est maintenu ?</text:span></text:p>
      <text:p text:style-name="Normal">Mettre la valeur du bouton dans un signal interne qui sert de flag/mémoire et avoir un autre signal interne qui va bloquer l’état tant que bouton n’a pas changé d’état lui aussi ne change pas.</text:p>
      <text:p text:style-name="Normal"/>
      <text:p text:style-name="P9">7. Mettez à jour votre code VHDL et vérifiez votre résultat à la simulation</text:p>
      <text:p text:style-name="Normal">L’objectif de cette simulation est de vérifier que la LED verte ne clignote qu’une seule fois même si le bouton btn est maintenu à l’état haut.<text:s/></text:p>
      <text:p text:style-name="Normal"><draw:frame draw:z-index="251692032" draw:id="id4" draw:style-name="a12" draw:name="Encre 40" text:anchor-type="paragraph" svg:x="0.16111in" svg:y="0.2875in" svg:width="0.34583in" svg:height="0.07986in" style:rel-width="scale" style:rel-height="scale"><draw:image xlink:href="media/image11.png" xlink:type="simple" xlink:show="embed" xlink:actuate="onLoad"/><svg:title/><svg:desc/></draw:frame><draw:frame draw:z-index="251686912" draw:id="id5" draw:style-name="a13" draw:name="Encre 35" text:anchor-type="paragraph" svg:x="-0.26313in" svg:y="0.59723in" svg:width="0.00039in" svg:height="0.00039in" style:rel-width="scale" style:rel-height="scale"><draw:image xlink:href="media/image12.png" xlink:type="simple" xlink:show="embed" xlink:actuate="onLoad"/><svg:title/><svg:desc/></draw:frame><draw:frame draw:z-index="251681792" draw:id="id6" draw:style-name="a14" draw:name="Encre 29" text:anchor-type="paragraph" svg:x="0.15267in" svg:y="0.31458in" svg:width="0.16042in" svg:height="0.02153in" style:rel-width="scale" style:rel-height="scale"><draw:image xlink:href="media/image13.png" xlink:type="simple" xlink:show="embed" xlink:actuate="onLoad"/><svg:title/><svg:desc/></draw:frame><draw:frame draw:style-name="a15" draw:name="Image 3" text:anchor-type="as-char" svg:x="0in" svg:y="0in" svg:width="6.3in" svg:height="1.59583in" style:rel-width="scale" style:rel-height="scale"><draw:image xlink:href="media/image14.png" xlink:type="simple" xlink:show="embed" xlink:actuate="onLoad"/><svg:title/><svg:desc/></draw:frame></text:p>
      <text:p text:style-name="Normal">Nous vérifions grâce au chronogramme que la LED verte ne clignote qu’une fois et repasse sur le clignotement de la LED rouge alors que le bouton est à ‘1’.</text:p>
      <text:p text:style-name="Normal"/>
      <text:p text:style-name="P10">8. Créez un module de pilotage d’une LED RGB en RTL. Ce dernier doit permettre de faire clignoter une LED RGB connectée en sortie d’une couleur définie par un code couleur donné en entrée. Le changement de couleur de la LED RGB n’a lieu que si un signal update est reçu.</text:p>
      <text:p text:style-name="P11"/>
      <text:p text:style-name="P12">9. Ajouter la logique nécessaire pour piloter les entrées/sorties de votre module.</text:p>
      <text:p text:style-name="Normal"><draw:frame draw:z-index="251680768" draw:id="id7" draw:style-name="a16" draw:name="Encre 25" text:anchor-type="paragraph" svg:x="2.14875in" svg:y="0.55504in" svg:width="0.00417in" svg:height="0.03264in" style:rel-width="scale" style:rel-height="scale"><draw:image xlink:href="media/image15.png" xlink:type="simple" xlink:show="embed" xlink:actuate="onLoad"/><svg:title/><svg:desc/></draw:frame><draw:frame draw:z-index="251679744" draw:id="id8" draw:style-name="a17" draw:name="Encre 24" text:anchor-type="paragraph" svg:x="1.52906in" svg:y="0.67512in" svg:width="0.00417in" svg:height="0.03681in" style:rel-width="scale" style:rel-height="scale"><draw:image xlink:href="media/image16.png" xlink:type="simple" xlink:show="embed" xlink:actuate="onLoad"/><svg:title/><svg:desc/></draw:frame><draw:frame draw:z-index="251678720" draw:id="id9" draw:style-name="a18" draw:name="Encre 23" text:anchor-type="paragraph" svg:x="1.52431in" svg:y="0.675in" svg:width="0.02083in" svg:height="0.05764in" style:rel-width="scale" style:rel-height="scale"><draw:image xlink:href="media/image17.png" xlink:type="simple" xlink:show="embed" xlink:actuate="onLoad"/><svg:title/><svg:desc/></draw:frame><draw:frame draw:z-index="251670528" draw:id="id10" draw:style-name="a19" draw:name="Encre 15" text:anchor-type="paragraph" svg:x="2.14914in" svg:y="0.5633in" svg:width="0.00417in" svg:height="0.02361in" style:rel-width="scale" style:rel-height="scale"><draw:image xlink:href="media/image18.png" xlink:type="simple" xlink:show="embed" xlink:actuate="onLoad"/><svg:title/><svg:desc/></draw:frame><draw:frame draw:style-name="a20" draw:name="Image 28" text:anchor-type="as-char" svg:x="0in" svg:y="0in" svg:width="6.28333in" svg:height="2.33542in" style:rel-width="scale" style:rel-height="scale"><draw:image xlink:href="media/image19.png" xlink:type="simple" xlink:show="embed" xlink:actuate="onLoad"/><svg:title/><svg:desc/></draw:frame></text:p>
      <text:p text:style-name="Normal">Le signal en sortie de la machine à état part dans un comparateur qui si est à 1 avec le bouton « update » va prendre la valeur du bon color_code dans le multiplexeur. Si toutes les conditions sont remplies, une des LED va clignoter pendant que les autres seront à ‘0’.<text:s/></text:p>
      <text:p text:style-name="Normal"/>
      <text:p text:style-name="P13">10. Ecrivez le code VHDL correspondant à votre architecture.</text:p>
      <text:soft-page-break/>
      <text:p text:style-name="P14">11. Ecrivez un testbench pour tester votre design.</text:p>
      <text:p text:style-name="Normal">Le but de ce testbench va être de vérifier l’alternance des couleurs par rapport au color_code définie par le bouton _1 et d’appliquer ce changement dès que le signal update est à 1 et ne le prendre en compte que une fois même s’il reste à l’état haut.<text:s/></text:p>
      <text:p text:style-name="Normal"/>
      <text:p text:style-name="P15">12. Vérifier votre résultat à la simulation</text:p>
      <text:p text:style-name="Normal">Dans cette simulation nous cherchons<text:s/>à<text:s/>vérifier sur le chronogramme les changements d’état des 2 leds et si sur update nous avons ce changement de LED<text:s/>mais qu’une seule fois.</text:p>
      <text:p text:style-name="Normal"><draw:frame draw:z-index="251693056" draw:id="id11" draw:style-name="a21" draw:name="Encre 41" text:anchor-type="paragraph" svg:x="0.17939in" svg:y="0.72047in" svg:width="0.25972in" svg:height="0.1in" style:rel-width="scale" style:rel-height="scale"><draw:image xlink:href="media/image20.png" xlink:type="simple" xlink:show="embed" xlink:actuate="onLoad"/><svg:title/><svg:desc/></draw:frame><draw:frame draw:z-index="251685888" draw:id="id12" draw:style-name="a22" draw:name="Encre 33" text:anchor-type="paragraph" svg:x="0.15149in" svg:y="0.73107in" svg:width="0.12847in" svg:height="0.02431in" style:rel-width="scale" style:rel-height="scale"><draw:image xlink:href="media/image21.png" xlink:type="simple" xlink:show="embed" xlink:actuate="onLoad"/><svg:title/><svg:desc/></draw:frame><draw:frame draw:style-name="a23" draw:name="Image 6" text:anchor-type="as-char" svg:x="0in" svg:y="0in" svg:width="6.3in" svg:height="1.51875in" style:rel-width="scale" style:rel-height="scale"><draw:image xlink:href="media/image22.png" xlink:type="simple" xlink:show="embed" xlink:actuate="onLoad"/><svg:title/><svg:desc/></draw:frame></text:p>
      <text:p text:style-name="Normal">Nous pouvons vérifier plusieurs conditions demandées dans le cahier des charges, update doit recevoir 1 quand btn0 est appuyé, le signal color mappé sur color_code qui à l’état 1 doit renvoyer du vert et à l’état 0 du bleu et en plus l’alternance des couleurs n’est<text:s/>réalisée<text:s/>que quand update est trigger.</text:p>
      <text:p text:style-name="Normal"/>
      <text:p text:style-name="P16">13. Réalisez une synthèse et étudiez le rapport de synthèse, les ressources utilisées doivent correspondre à votre schéma RTL.</text:p>
      <text:p text:style-name="Normal"><draw:frame draw:style-name="a24" draw:name="Image 26" text:anchor-type="as-char" svg:x="0in" svg:y="0in" svg:width="1.8961in" svg:height="3.27129in" style:rel-width="scale" style:rel-height="scale"><draw:image xlink:href="media/image23.png" xlink:type="simple" xlink:show="embed" xlink:actuate="onLoad"/><svg:title/><svg:desc/></draw:frame></text:p>
      <text:p text:style-name="Normal">Nous avons les<text:s/>3<text:s/>inputs<text:s/>dont 2<text:s/>pour les boutons<text:s/>un pour color_code et l’autre pour update et le 3<text:span text:style-name="T17">ième</text:span><text:s/>input est pour l’horloge clk,<text:s/>le carry4 qui correspond à notre compteur, me FSDE et LD (2) qui sont là pour notre machine a état (green et red).</text:p>
      <text:p text:style-name="Normal"/>
      <text:soft-page-break/>
      <text:p text:style-name="P18">14. Effectuez le placement routage et étudiez les rapports.</text:p>
      <text:p text:style-name="Normal"><draw:frame draw:style-name="a25" draw:name="Image 27" text:anchor-type="as-char" svg:x="0in" svg:y="0in" svg:width="6.3in" svg:height="0.65625in" style:rel-width="scale" style:rel-height="scale"><draw:image xlink:href="media/image24.png" xlink:type="simple" xlink:show="embed" xlink:actuate="onLoad"/><svg:title/><svg:desc/></draw:frame></text:p>
      <text:p text:style-name="Normal"/>
      <table:table table:style-name="Table19">
        <table:table-columns>
          <table:table-column table:style-name="TableColumn20"/>
          <table:table-column table:style-name="TableColumn21"/>
        </table:table-columns>
        <table:table-row table:style-name="TableRow22">
          <table:table-cell table:style-name="TableCell23">
            <text:p text:style-name="P24">Chemin critique (ns)</text:p>
          </table:table-cell>
          <table:table-cell table:style-name="TableCell25">
            <text:p text:style-name="P26">5.679</text:p>
          </table:table-cell>
        </table:table-row>
        <table:table-row table:style-name="TableRow27">
          <table:table-cell table:style-name="TableCell28">
            <text:p text:style-name="P29">Worst negative slack (ns)</text:p>
          </table:table-cell>
          <table:table-cell table:style-name="TableCell30">
            <text:p text:style-name="P31">5.679</text:p>
          </table:table-cell>
        </table:table-row>
        <table:table-row table:style-name="TableRow32">
          <table:table-cell table:style-name="TableCell33">
            <text:p text:style-name="P34">Total negative slack (ns)</text:p>
          </table:table-cell>
          <table:table-cell table:style-name="TableCell35">
            <text:p text:style-name="P36">0</text:p>
          </table:table-cell>
        </table:table-row>
        <table:table-row table:style-name="TableRow37">
          <table:table-cell table:style-name="TableCell38">
            <text:p text:style-name="P39">Worst hold slack (ns)</text:p>
          </table:table-cell>
          <table:table-cell table:style-name="TableCell40">
            <text:p text:style-name="P41">0.261</text:p>
          </table:table-cell>
        </table:table-row>
        <table:table-row table:style-name="TableRow42">
          <table:table-cell table:style-name="TableCell43">
            <text:p text:style-name="P44">Total hold slack (ns)</text:p>
          </table:table-cell>
          <table:table-cell table:style-name="TableCell45">
            <text:p text:style-name="P46">0</text:p>
          </table:table-cell>
        </table:table-row>
      </table:table>
      <text:p text:style-name="Normal"/>
      <text:p text:style-name="Normal">Pour vérifier que nous n’avons pas de violation de timing nous vérifions le pire cas le WNS qui est à 5.679ns tant qu’il est positif nous avons le pire slack donc tous les autres sont positif.</text:p>
      <text:p text:style-name="Normal"><draw:frame draw:style-name="a26" draw:name="Image 28" text:anchor-type="as-char" svg:x="0in" svg:y="0in" svg:width="6.3in" svg:height="1.04236in" style:rel-width="scale" style:rel-height="scale"><draw:image xlink:href="media/image25.png" xlink:type="simple" xlink:show="embed" xlink:actuate="onLoad"/><svg:title/><svg:desc/></draw:frame></text:p>
      <text:p text:style-name="Normal">On voit le chemin critique qui passe dans le registre et qui est très faible.</text:p>
      <text:p text:style-name="Normal"/>
      <text:p text:style-name="P47">15. Générez le bitstream et vérifiez que vous avez le comportement attendu sur carte.</text:p>
      <text:p text:style-name="Normal">Tous les comportements sont respectés et réagissent à ce que nous attendions d’eux.</text:p>
      <text:p text:style-name="Normal"><text:a xlink:href="https://youtu.be/jT6yvbVGPaw" office:target-frame-name="_top" xlink:show="replace"><text:span text:style-name="Lienhypertexte">https://youtu.be/jT6yvbVGPaw</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background-fill draw:fill="solid"/>
      </style:paragraph-properties>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DengXian Light"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DengXian Light"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DengXian Light"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DengXian Light"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DengXian Light"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DengXian Light"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DengXian Light"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DengXian Light"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DengXian Light"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DengXian Light"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DengXian Light" style:font-name-complex="Times New Roman" fo:color="#2F5496" fo:font-size="16pt" style:font-size-asian="16pt" style:font-size-complex="16pt"/>
    </style:style>
    <style:style style:name="Titre3Car" style:display-name="Titre 3 Car" style:family="text" style:parent-style-name="Policepardéfaut">
      <style:text-properties style:font-name-asian="DengXian Light" style:font-name-complex="Times New Roman" fo:color="#2F5496" fo:font-size="14pt" style:font-size-asian="14pt" style:font-size-complex="14pt"/>
    </style:style>
    <style:style style:name="Titre4Car" style:display-name="Titre 4 Car" style:family="text" style:parent-style-name="Policepardéfaut">
      <style:text-properties style:font-name-asian="DengXian Light"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DengXian Light" style:font-name-complex="Times New Roman" fo:color="#2F5496"/>
    </style:style>
    <style:style style:name="Titre6Car" style:display-name="Titre 6 Car" style:family="text" style:parent-style-name="Policepardéfaut">
      <style:text-properties style:font-name-asian="DengXian Light"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DengXian Light" style:font-name-complex="Times New Roman" fo:color="#595959"/>
    </style:style>
    <style:style style:name="Titre8Car" style:display-name="Titre 8 Car" style:family="text" style:parent-style-name="Policepardéfaut">
      <style:text-properties style:font-name-asian="DengXian Light"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DengXian Light"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DengXian Light"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DengXian Light"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DengXian Light"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DengXian Light"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mien zhang</meta:initial-creator>
    <dc:creator>damien zhang</dc:creator>
    <meta:creation-date>2026-07-09T15:35:00Z</meta:creation-date>
    <dc:date>2026-07-16T13:03:00Z</dc:date>
    <meta:template xlink:href="Normal.dotm" xlink:type="simple"/>
    <meta:editing-cycles>10</meta:editing-cycles>
    <meta:editing-duration>PT20220S</meta:editing-duration>
    <meta:document-statistic meta:page-count="4" meta:paragraph-count="9" meta:word-count="705" meta:character-count="4579" meta:row-count="32" meta:non-whitespace-character-count="3883"/>
  </office:meta>
</office:document-meta>
</file>