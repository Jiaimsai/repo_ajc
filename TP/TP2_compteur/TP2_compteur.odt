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3.6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2.13891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1.2212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L’horloge du système est fixée à 100MHz. Combien de période faut-il compter pour attendre 2 secondes ? Combien de bits faut-il au minimum pour représenter cette valeur ?</text:p>
      <text:p text:style-name="Normal">Il faut 200 millions de période pour avoir 2 secondes. Il faut 2<text:span text:style-name="T2">28</text:span><text:s/>bits = 268 435 455.</text:p>
      <text:p text:style-name="Normal"/>
      <text:p text:style-name="Normal">2. Dessinez le schéma RTL de ce compteur. Si le compteur atteint la valeur calculée précédemment, un signal end_counter passe à 1, sinon end_counter vaut 0. N’oubliez pas de mettre sur chaque signal son nombre de bits. Commencez par réaliser une boucle d’incrémentation : +1 à chaque coup d’horloge.</text:p>
      <text:p text:style-name="Normal"><draw:frame draw:style-name="a0" draw:name="Image 12" text:anchor-type="as-char" svg:x="0in" svg:y="0in" svg:width="6.29861in" svg:height="2.37662in" style:rel-width="scale" style:rel-height="scale"><draw:image xlink:href="media/image1.png" xlink:type="simple" xlink:show="embed" xlink:actuate="onLoad"/><svg:title/><svg:desc/></draw:frame></text:p>
      <text:p text:style-name="Normal">Sur ce schéma RTL nous comparons la valeur de sortie du registre, tant qu’il est en dessous de la valeur C souhaité end_counter ne change pas d’état.</text:p>
      <text:p text:style-name="Normal">3. Ajoutez une condition pour que le compteur soit remis à 0 lorsqu’il a atteint la valeur souhaitée.</text:p>
      <text:p text:style-name="Normal"><draw:frame draw:style-name="a1" draw:name="Image 18" text:anchor-type="as-char" svg:x="0in" svg:y="0in" svg:width="6.29236in" svg:height="1.98701in" style:rel-width="scale" style:rel-height="scale"><draw:image xlink:href="media/image2.png" xlink:type="simple" xlink:show="embed" xlink:actuate="onLoad"/><svg:title/><svg:desc/></draw:frame></text:p>
      <text:p text:style-name="Normal">Sur ce schéma RTL le comparateur de la valeur C souhaité reboucle et passe la valeur de Din à 0 une fois atteint et un multiplexeur analyse la valeur afin d’affecter le bon état à end_counter</text:p>
      <text:p text:style-name="Normal">4. Listez les signaux d’entrée, de sortie et les signaux internes de votre architecture.</text:p>
      <text:p text:style-name="Normal">Signal d’entrée : CLK</text:p>
      <text:p text:style-name="Normal">Signal de sortie : end_counter</text:p>
      <text:p text:style-name="Normal">Signaux internes : Din et max</text:p>
      <text:p text:style-name="Normal"/>
      <text:soft-page-break/>
      <text:p text:style-name="Normal">7. Lancez une simulation. Que devez-vous observez sur votre chronogramme pour vérifier que votre design est valide ?</text:p>
      <text:p text:style-name="Normal"><draw:frame draw:style-name="a2" draw:name="Image 1" text:anchor-type="as-char" svg:x="0in" svg:y="0in" svg:width="6.3in" svg:height="1.61458in" style:rel-width="scale" style:rel-height="scale"><draw:image xlink:href="media/image3.png" xlink:type="simple" xlink:show="embed" xlink:actuate="onLoad"/><svg:title/><svg:desc/></draw:frame></text:p>
      <text:p text:style-name="Normal">On doit observer le passage a 1 d’end_counter quand on atteint les 2 secondes.</text:p>
      <text:p text:style-name="Normal"/>
      <text:p text:style-name="Normal">9. Modifiez le schéma RTL du compteur pour ajouter une remise à 0 lorsqu’un signal restart est à 1. Ajoutez la logique nécessaire pour que la LED clignote telle que : allumée 2s, éteinte 2s</text:p>
      <text:p text:style-name="Normal"><draw:frame draw:style-name="a3" draw:name="Image 19" text:anchor-type="as-char" svg:x="0in" svg:y="0in" svg:width="6.29236in" svg:height="3.20764in" style:rel-width="scale" style:rel-height="scale"><draw:image xlink:href="media/image2.png" xlink:type="simple" xlink:show="embed" xlink:actuate="onLoad"/><svg:title/><svg:desc/></draw:frame></text:p>
      <text:p text:style-name="Normal">On ajoute le reset_n afin de permettre au système de revenir a son état initial qui est représenté en bas du bloc registre.</text:p>
      <text:p text:style-name="Normal">12. Mettez à jour votre testbench puis vérifier votre design avec une simulation. Quels sont les signaux que vous devez observer ?</text:p>
      <text:p text:style-name="Normal"><draw:frame draw:style-name="a4" draw:name="Image 8" text:anchor-type="as-char" svg:x="0in" svg:y="0in" svg:width="6.3in" svg:height="1.14931in" style:rel-width="scale" style:rel-height="scale"><draw:image xlink:href="media/image4.png" xlink:type="simple" xlink:show="embed" xlink:actuate="onLoad"/><svg:title/><svg:desc/></draw:frame></text:p>
      <text:p text:style-name="Normal">Les signaux qu’on doit surveiller sont le restart<text:s/>qui redémarre bien le système et le maintien en attente tant qu’il est trigger, le compteur<text:s/>s’il incrémente bien<text:s/>et l’end_counter<text:s/>s’il passe bien à 1 à la fin de chaque cycle.</text:p>
      <text:soft-page-break/>
      <text:p text:style-name="Normal">13. Exécutez la synthèse puis ouvrez la schématique. Identifiez sur la schématique les différents éléments de votre architecture RTL.</text:p>
      <text:p text:style-name="Normal"><draw:frame draw:style-name="a5" draw:name="Image 7" text:anchor-type="as-char" svg:x="0in" svg:y="0in" svg:width="6.3in" svg:height="2.59861in" style:rel-width="scale" style:rel-height="scale"><draw:image xlink:href="media/image5.png" xlink:type="simple" xlink:show="embed" xlink:actuate="onLoad"/><svg:title/><svg:desc/></draw:frame></text:p>
      <text:p text:style-name="Normal">On a bien les deux entrées CLK et restart, nos 28 registres qui sont utilisés pour le compteur, le compteur en lui-même qui fait les + 1 (fils rouge) et la sortie qui reset a 0 et qui est relié à la LED.</text:p>
      <text:p text:style-name="Normal"/>
      <text:p text:style-name="Normal">14. Ouvrez le rapport de synthèse et relevez les ressources utilisées. Comparez vos résultats avec les résultats attendu selon votre architecture RTL.</text:p>
      <text:p text:style-name="Normal"><draw:frame draw:style-name="a6" draw:name="Image 8" text:anchor-type="as-char" svg:x="0in" svg:y="0in" svg:width="3.39631in" svg:height="1.00014in" style:rel-width="scale" style:rel-height="scale"><draw:image xlink:href="media/image6.png" xlink:type="simple" xlink:show="embed" xlink:actuate="onLoad"/><svg:title/><svg:desc/></draw:frame></text:p>
      <text:p text:style-name="Normal">On a deux entrées<text:s/>qui correspondent à CLK et Restart, un MUX et un registre<text:s/>pour le compteur<text:s/>donc tout est bon.</text:p>
      <text:p text:style-name="Normal"/>
      <text:p text:style-name="Normal">16. Lancez l’implémentation puis étudiez le rapport de timing (vérifiez les violations de set up et de hold et identifiez le chemin critique).</text:p>
      <text:p text:style-name="Normal"><draw:frame draw:style-name="a7" draw:name="Image 9" text:anchor-type="as-char" svg:x="0in" svg:y="0in" svg:width="6.3in" svg:height="0.73264in" style:rel-width="scale" style:rel-height="scale"><draw:image xlink:href="media/image7.png" xlink:type="simple" xlink:show="embed" xlink:actuate="onLoad"/><svg:title/><svg:desc/></draw:frame></text:p>
      <text:p text:style-name="Normal">Les deux valeurs sont à 0 donc il n’y a pas de violation.</text:p>
      <text:p text:style-name="Normal"><draw:frame draw:style-name="a8" draw:name="Image 10" text:anchor-type="as-char" svg:x="0in" svg:y="0in" svg:width="6.3in" svg:height="0.95764in" style:rel-width="scale" style:rel-height="scale"><draw:image xlink:href="media/image8.png" xlink:type="simple" xlink:show="embed" xlink:actuate="onLoad"/><svg:title/><svg:desc/></draw:frame></text:p>
      <text:p text:style-name="Normal">On voit le chemin critique qui passe dans le registre.</text:p>
      <text:p text:style-name="Normal"/>
      <text:soft-page-break/>
      <text:p text:style-name="Normal">17. Générez le bitstream pour observer le système sur carte et le résultat de la ILA.</text:p>
      <text:p text:style-name="Normal"><draw:frame draw:style-name="a9" draw:name="Image 11" text:anchor-type="as-char" svg:x="0in" svg:y="0in" svg:width="6.3in" svg:height="1.99097in" style:rel-width="scale" style:rel-height="scale"><draw:image xlink:href="media/image9.png" xlink:type="simple" xlink:show="embed" xlink:actuate="onLoad"/><svg:title/><svg:desc/></draw:frame></text:p>
      <text:p text:style-name="Normal">On peut observer sur l’ILA l’incrémentation de Din, end_counter à l’état haut et restart a l’état bas donc pas trigger et qui ne met pas le système en atten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2F5496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mien zhang</meta:initial-creator>
    <dc:creator>damien zhang</dc:creator>
    <meta:creation-date>2026-07-03T12:47:00Z</meta:creation-date>
    <dc:date>2026-07-08T12:12:00Z</dc:date>
    <meta:template xlink:href="Normal.dotm" xlink:type="simple"/>
    <meta:editing-cycles>6</meta:editing-cycles>
    <meta:editing-duration>PT27300S</meta:editing-duration>
    <meta:document-statistic meta:page-count="4" meta:paragraph-count="6" meta:word-count="488" meta:character-count="3166" meta:row-count="22" meta:non-whitespace-character-count="2684"/>
  </office:meta>
</office:document-meta>
</file>